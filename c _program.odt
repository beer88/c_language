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text:line-break/>//factorial calculation<text:line-break/><text:line-break/>#include&lt;stdio.h&gt;<text:line-break/>int main()<text:line-break/>{<text:line-break/> <text:s text:c="3"/>int i,num;<text:line-break/> <text:s text:c="3"/>unsigned long long int fact=1;<text:line-break/> <text:s text:c="3"/>printf("Enter a positive integer:\n");<text:line-break/> <text:s text:c="3"/>scanf("%d",&amp;num);<text:line-break/> <text:s text:c="3"/><text:line-break/> <text:s text:c="3"/>for(i=1;i&lt;=num;i++)<text:line-break/> <text:s text:c="3"/>{<text:line-break/> <text:s text:c="3"/>fact=fact*i;<text:line-break/> <text:s text:c="3"/>printf("The value of fact is %llu &amp; i is %d\n",fact,i);<text:line-break/> <text:s text:c="3"/>}<text:line-break/> <text:s text:c="3"/>printf("factorial of %d is %llu",num,fact);<text:line-break/> <text:s text:c="3"/>return 0;<text:line-break/>}<text:line-break/><text:line-break/><text:line-break/><text:line-break/>//Fibonacci Series<text:line-break/>#include&lt;stdio.h&gt;<text:line-break/>int main()<text:line-break/>{<text:line-break/> <text:s text:c="3"/>int num,i, t1=0,t2=1,nextterm=t1+t2;<text:line-break/> <text:s text:c="3"/>printf("Enter a positve integer:\n");<text:line-break/> <text:s text:c="3"/>scanf("%d",&amp;num);<text:line-break/> <text:s text:c="3"/><text:line-break/> <text:s text:c="3"/>printf("Fibonacci Series:\n");<text:line-break/> <text:s text:c="3"/>printf("%d,",t1);<text:line-break/> <text:s text:c="3"/>printf("%d,",t2);<text:line-break/> <text:s text:c="3"/>for(i=0; i&lt;=num; i++)<text:line-break/> <text:s text:c="3"/>{<text:line-break/> <text:s text:c="3"/>nextterm=t1+t2;<text:line-break/> <text:s text:c="3"/>//printf("nextTerm=%d\n",nextterm);<text:line-break/> <text:s text:c="3"/>t1=t2;<text:line-break/> <text:s text:c="3"/>//printf("t1 is %d\n",t1);<text:line-break/> <text:s text:c="3"/>t2=nextterm;<text:line-break/> <text:s text:c="3"/>//printf("t2 is %d\n",t2);<text:line-break/> <text:s text:c="3"/>printf("%d,",nextterm);<text:line-break/>}<text:line-break/>}<text:line-break/><text:line-break/><text:line-break/>//prime number check<text:line-break/>#include&lt;stdio.h&gt;<text:line-break/>int main()<text:line-break/>{<text:line-break/> <text:s text:c="3"/>int i,num,flag=0;<text:line-break/> <text:s text:c="3"/><text:line-break/><text:soft-page-break/> <text:s text:c="3"/>while(1)<text:line-break/> <text:s text:c="3"/>{<text:line-break/> <text:s text:c="7"/>flag=0;<text:line-break/> <text:s text:c="3"/><text:line-break/> <text:s text:c="3"/>printf("Enter a positive integer:\n");<text:line-break/> <text:s text:c="3"/>scanf("%d",&amp;num);<text:line-break/> <text:s text:c="3"/><text:line-break/> <text:s text:c="3"/>for(i=2;i&lt;=num/2;i++)<text:line-break/> <text:s text:c="3"/>{<text:line-break/> <text:s text:c="3"/>if(num%i==0)<text:line-break/> <text:s text:c="3"/>{<text:line-break/> <text:s text:c="7"/>flag=1;<text:line-break/> <text:s text:c="7"/>break;<text:line-break/> <text:s text:c="3"/>}<text:line-break/> <text:s text:c="3"/>}<text:line-break/><text:line-break/> <text:s text:c="4"/>if(num==1)<text:line-break/> <text:s text:c="3"/>{<text:line-break/> <text:s text:c="7"/>printf("%d is neither composite nor prime number.\n",num);<text:line-break/> <text:s text:c="7"/>printf("\n");<text:line-break/> <text:s text:c="3"/>}<text:line-break/> <text:s text:c="3"/><text:line-break/> <text:s text:c="7"/>else if(num==0)<text:line-break/> <text:s text:c="3"/>{<text:line-break/> <text:s text:c="7"/>printf("%d is neither composite nor prime number.\n",num);<text:line-break/> <text:s text:c="7"/>printf("\n");<text:line-break/> <text:s text:c="3"/>}<text:line-break/> <text:s text:c="3"/><text:line-break/> <text:s text:c="6"/>else if(flag==0)<text:line-break/> <text:s text:c="3"/>{<text:line-break/> <text:s text:c="7"/>printf("%d is a prime number.\n",num);<text:line-break/> <text:s text:c="7"/>printf("\n");<text:line-break/> <text:s text:c="3"/>}<text:line-break/> <text:s text:c="3"/><text:line-break/> <text:s text:c="3"/>else if(flag==1)<text:line-break/> <text:s text:c="3"/>{<text:line-break/> <text:s text:c="7"/>printf("It's a prime numeber.");<text:line-break/> <text:s text:c="3"/>}<text:line-break/> <text:s text:c="3"/><text:line-break/> <text:s text:c="3"/>else{<text:line-break/> <text:s text:c="7"/>printf("%d is not a prime number.\n",num);<text:line-break/> <text:s text:c="7"/>printf("\n");<text:line-break/> <text:s text:c="3"/>}<text:line-break/> <text:s text:c="3"/>}<text:line-break/>return 0;<text:line-break/>}<text:line-break/>*/<text:line-break/><text:line-break/>//Reverse a string :<text:line-break/>#include&lt;stdio.h&gt;<text:line-break/>#include&lt;string.h&gt;<text:line-break/><text:line-break/><text:soft-page-break/>int main()<text:line-break/>{<text:line-break/> <text:s text:c="3"/>char str[100],rev[100];<text:line-break/> <text:s text:c="3"/>int len,i;<text:line-break/> <text:s text:c="3"/>while(1)<text:line-break/> <text:s text:c="3"/>{<text:line-break/> <text:s text:c="3"/>printf("Enter a string.\n");<text:line-break/> <text:s text:c="3"/>//scanf("%s",str);<text:line-break/> <text:s text:c="3"/>fgets(str, sizeof(str), stdin);<text:line-break/><text:line-break/> <text:s text:c="3"/>len=strlen(str);<text:line-break/> <text:s text:c="3"/>for(i=0;i&lt;len;i++)<text:line-break/> <text:s text:c="3"/>{<text:line-break/> <text:s text:c="3"/>rev[i]=str[len-1-i];<text:line-break/> <text:s text:c="3"/>rev[len]='\0';<text:line-break/> <text:s text:c="3"/>}<text:line-break/> <text:s text:c="3"/>printf("Reversed string is: %s\n",rev);<text:line-break/> <text:s text:c="3"/>printf("\n");<text:line-break/> <text:s text:c="3"/>}<text:line-break/> <text:s text:c="3"/>return 0;<text:line-break/>}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3T18:14:13.820493300</meta:creation-date>
    <dc:date>2026-06-13T18:14:38.253800900</dc:date>
    <meta:editing-duration>PT25S</meta:editing-duration>
    <meta:editing-cycles>1</meta:editing-cycles>
    <meta:document-statistic meta:table-count="0" meta:image-count="0" meta:object-count="0" meta:page-count="3" meta:paragraph-count="1" meta:word-count="193" meta:character-count="2071" meta:non-whitespace-character-count="1437"/>
    <meta:generator>LibreOffice/26.2.3.2$Windows_X86_64 LibreOffice_project/70e089b17412e4cb7773e41413306b17a2328c34</meta:generator>
  </office:meta>
</office:document-meta>
</file>